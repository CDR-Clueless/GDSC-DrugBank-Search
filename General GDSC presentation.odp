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D00000019F05BDBB107E78184B.png" manifest:media-type="image/png"/>
  <manifest:file-entry manifest:full-path="Pictures/100000010000006400000064C066C3864EF1242E.png" manifest:media-type="image/png"/>
  <manifest:file-entry manifest:full-path="Pictures/100000010000027F000001DFE5DE42D8381E44B2.png" manifest:media-type="image/png"/>
  <manifest:file-entry manifest:full-path="Pictures/100000010000027F000001DFF9C2E650C0D83448.png" manifest:media-type="image/png"/>
  <manifest:file-entry manifest:full-path="Pictures/1000000100000280000001E07D521C2CB6B30F71.png" manifest:media-type="image/png"/>
  <manifest:file-entry manifest:full-path="Pictures/1000000100000280000001E0F08080E28A8AE022.png" manifest:media-type="image/png"/>
  <manifest:file-entry manifest:full-path="Pictures/10000001000000770000000E47B41ACD66CCABEA.png" manifest:media-type="image/png"/>
  <manifest:file-entry manifest:full-path="Pictures/1000000100000280000001E0951DFA5E4C78C133.png" manifest:media-type="image/png"/>
  <manifest:file-entry manifest:full-path="Pictures/1000000100000280000001E0A9ACFD1D751D83AA.png" manifest:media-type="image/png"/>
  <manifest:file-entry manifest:full-path="Pictures/1000000100000280000001E00093B456B73747BB.png" manifest:media-type="image/png"/>
  <manifest:file-entry manifest:full-path="Pictures/1000000100000280000001E04E9FF85075FDBC76.png" manifest:media-type="image/png"/>
  <manifest:file-entry manifest:full-path="Pictures/1000000100000280000001E083278B364C682CA0.png" manifest:media-type="image/png"/>
  <manifest:file-entry manifest:full-path="Pictures/1000000100000280000001E03215279456C52929.png" manifest:media-type="image/png"/>
  <manifest:file-entry manifest:full-path="Pictures/1000000100000280000001E06826CC912A162EBD.png" manifest:media-type="image/png"/>
  <manifest:file-entry manifest:full-path="Pictures/10000001000002A600000258B1CF5B36D6CD83AF.png" manifest:media-type="image/png"/>
  <manifest:file-entry manifest:full-path="Pictures/10000001000003200000025481996188B8DC59A2.png" manifest:media-type="image/png"/>
  <manifest:file-entry manifest:full-path="Pictures/10000001000000C600000018D70A52FDB9168B42.png" manifest:media-type="image/png"/>
  <manifest:file-entry manifest:full-path="Pictures/10000001000000DB00000013ADFAEEA8C8298FDB.png" manifest:media-type="image/png"/>
  <manifest:file-entry manifest:full-path="Pictures/10000001000000C20000000E6F980C315491B2F6.png" manifest:media-type="image/png"/>
  <manifest:file-entry manifest:full-path="Pictures/1000895100001481000002862E8F5DEEA8EA3CC5.svg" manifest:media-type="image/svg+xml"/>
  <manifest:file-entry manifest:full-path="Pictures/1000366300000C410000017A2C562D645983F5C0.svg" manifest:media-type="image/svg+xml"/>
  <manifest:file-entry manifest:full-path="Pictures/1000000100000280000001E09582600848C6742C.png" manifest:media-type="image/png"/>
  <manifest:file-entry manifest:full-path="Pictures/1000000100000280000001E0E2020A0676EF950D.png" manifest:media-type="image/png"/>
  <manifest:file-entry manifest:full-path="Pictures/10006936000014160000016C0638EE4D8EE82711.svg" manifest:media-type="image/svg+xml"/>
  <manifest:file-entry manifest:full-path="Pictures/1000000100000280000001E0394FBE15601AE57F.png" manifest:media-type="image/png"/>
  <manifest:file-entry manifest:full-path="Pictures/1000000100000280000001E0B07C24D59AE426C1.png" manifest:media-type="image/png"/>
  <manifest:file-entry manifest:full-path="Pictures/1000D15500001F12000003203A39568891AFB569.svg" manifest:media-type="image/svg+xml"/>
  <manifest:file-entry manifest:full-path="Pictures/1000000100000280000001E0F807CBD64144C075.png" manifest:media-type="image/png"/>
  <manifest:file-entry manifest:full-path="Pictures/1000997F000016A4000001EDB3644AF8144B56D5.svg" manifest:media-type="image/svg+xml"/>
  <manifest:file-entry manifest:full-path="Pictures/100000010000012D0000001E6204EA52E448FAC9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6.862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75cm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5.689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239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5.728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4.978cm"/>
      <style:paragraph-properties style:writing-mode="lr-tb"/>
    </style:style>
    <style:style style:name="gr11" style:family="graphic" style:parent-style-name="Object_20_with_20_no_20_fill_20_and_20_no_20_line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6.859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4.439cm"/>
      <style:paragraph-properties style:writing-mode="lr-tb"/>
    </style:style>
    <style:style style:name="pr1" style:family="presentation" style:parent-style-name="Default-title">
      <style:graphic-properties fo:min-height="5.209cm"/>
      <style:paragraph-properties style:writing-mode="lr-tb"/>
    </style:style>
    <style:style style:name="pr2" style:family="presentation" style:parent-style-name="Default-subtitle">
      <style:graphic-properties draw:fill-color="#ffffff" fo:min-height="4.5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title">
      <style:graphic-properties fo:min-height="2.629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-color="#ffffff"/>
      <style:paragraph-properties fo:text-align="start" style:writing-mode="lr-tb"/>
      <style:text-properties fo:font-size="22pt" style:font-size-asian="22pt" style:font-size-complex="22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loext:graphic-properties draw:fill="none" draw:fill-color="#ffffff"/>
      <style:paragraph-properties style:writing-mode="lr-tb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center"/>
    </style:style>
    <style:style style:name="P8" style:family="paragraph">
      <loext:graphic-properties draw:fill-color="#ffffff"/>
    </style:style>
    <style:style style:name="P9" style:family="paragraph">
      <loext:graphic-properties draw:fill="none" draw:fill-color="#ffffff"/>
      <style:paragraph-properties style:writing-mode="lr-tb"/>
      <style:text-properties fo:font-size="6pt" style:font-size-asian="6pt" style:font-size-complex="6pt"/>
    </style:style>
    <style:style style:name="P10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loext:graphic-properties draw:fill="none"/>
      <style:paragraph-properties fo:text-align="center" style:writing-mode="lr-tb"/>
    </style:style>
    <style:style style:name="P12" style:family="paragraph">
      <loext:graphic-properties draw:fill="none" draw:fill-color="#ffffff"/>
      <style:paragraph-properties style:writing-mode="lr-tb"/>
      <style:text-properties fo:font-size="16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style:text-position="33% 58%"/>
    </style:style>
    <style:style style:name="T3" style:family="text">
      <style:text-properties fo:font-size="6pt" style:font-size-asian="6pt" style:font-size-complex="6pt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font-size="16pt"/>
    </style:style>
    <style:style style:name="T6" style:family="text">
      <style:text-properties style:text-position="33% 58%" fo:font-size="16pt"/>
    </style:style>
    <style:style style:name="T7" style:family="text">
      <style:text-properties style:text-position="-8% 58%" fo:font-size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5.209cm" svg:x="1.4cm" svg:y="2.632cm" presentation:class="title" presentation:user-transformed="true">
          <draw:text-box>
            <text:p>Comparison of GDSC-predicted drug-gene interactions with known drug targets</text:p>
          </draw:text-box>
        </draw:frame>
        <draw:frame presentation:style-name="pr2" draw:text-style-name="P3" draw:layer="layout" svg:width="15.687cm" svg:height="4.5cm" svg:x="0.313cm" svg:y="11cm" presentation:class="subtitle" presentation:user-transformed="true">
          <draw:text-box>
            <text:p text:style-name="P2"><text:span text:style-name="T1">Joseph Starkey</text:span></text:p>
            <text:p text:style-name="P2"><text:span text:style-name="T1"/></text:p>
            <text:p text:style-name="P2"><text:span text:style-name="T1">Supervisor: Nick Hay</text:span></text:p>
            <text:p text:style-name="P2"><text:span text:style-name="T1">Co-Supervisor: Frances Pearl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text-style-name="P1" draw:layer="layout" svg:width="25.199cm" svg:height="2.629cm" svg:x="1.4cm" svg:y="0.628cm" presentation:class="title">
          <draw:text-box>
            <text:p>Cell Line Data</text:p>
          </draw:text-box>
        </draw:frame>
        <draw:frame draw:style-name="gr2" draw:text-style-name="P5" draw:layer="layout" svg:width="8.5cm" svg:height="7.112cm" svg:x="1cm" svg:y="4cm">
          <draw:text-box>
            <text:p>Gene Essentiality: DepMap</text:p>
            <text:p/>
            <text:p>CRISPR-derived experiments producing scores indicating how essential for survival each gene is within a given cell line</text:p>
          </draw:text-box>
        </draw:frame>
        <draw:frame draw:style-name="gr3" draw:text-style-name="P5" draw:layer="layout" svg:width="10cm" svg:height="7cm" svg:x="17.5cm" svg:y="4cm">
          <draw:text-box>
            <text:p>Drug Response: GDSC</text:p>
            <text:p/>
            <text:p>Experiments giving IC50 and/or eMax response of each cell line to different pharmacological drugs</text:p>
          </draw:text-box>
        </draw:frame>
        <draw:frame draw:style-name="gr4" draw:text-style-name="P6" draw:layer="layout" svg:width="7.066cm" svg:height="5.264cm" svg:x="9.934cm" svg:y="6.736cm">
          <draw:image xlink:href="Pictures/10000001000003200000025481996188B8DC59A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text-style-name="P1" draw:layer="layout" svg:width="25.199cm" svg:height="2.629cm" svg:x="1.4cm" svg:y="0.628cm" presentation:class="title">
          <draw:text-box>
            <text:p>Essentiality-Response Comparison</text:p>
          </draw:text-box>
        </draw:frame>
        <draw:frame draw:style-name="gr4" draw:text-style-name="P6" draw:layer="layout" svg:width="8.768cm" svg:height="6.576cm" svg:x="3.732cm" svg:y="9.174cm">
          <draw:image xlink:href="Pictures/1000000100000280000001E0E2020A0676EF950D.png" xlink:type="simple" xlink:show="embed" xlink:actuate="onLoad" draw:mime-type="image/png">
            <text:p/>
          </draw:image>
        </draw:frame>
        <draw:frame draw:style-name="gr4" draw:text-style-name="P6" draw:layer="layout" svg:width="8.768cm" svg:height="6.576cm" svg:x="0cm" svg:y="2.924cm">
          <draw:image xlink:href="Pictures/1000000100000280000001E04E9FF85075FDBC76.png" xlink:type="simple" xlink:show="embed" xlink:actuate="onLoad" draw:mime-type="image/png">
            <text:p/>
          </draw:image>
        </draw:frame>
        <draw:frame draw:style-name="gr4" draw:text-style-name="P6" draw:layer="layout" svg:width="8.755cm" svg:height="6.566cm" svg:x="18.5cm" svg:y="9.184cm">
          <draw:image xlink:href="Pictures/1000000100000280000001E06826CC912A162EBD.png" xlink:type="simple" xlink:show="embed" xlink:actuate="onLoad" draw:mime-type="image/png">
            <text:p/>
          </draw:image>
        </draw:frame>
        <draw:frame draw:style-name="gr4" draw:text-style-name="P6" draw:layer="layout" svg:width="8.768cm" svg:height="6.577cm" svg:x="15.5cm" svg:y="2.923cm">
          <draw:image xlink:href="Pictures/1000000100000280000001E0951DFA5E4C78C13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text-style-name="P1" draw:layer="layout" svg:width="25.199cm" svg:height="2.629cm" svg:x="1.4cm" svg:y="0.628cm" presentation:class="title">
          <draw:text-box>
            <text:p>Z-Scores</text:p>
          </draw:text-box>
        </draw:frame>
        <draw:frame draw:style-name="gr4" draw:text-style-name="P6" draw:layer="layout" svg:width="14.064cm" svg:height="10.548cm" svg:x="7cm" svg:y="3.952cm">
          <draw:image xlink:href="Pictures/1000000100000280000001E07D521C2CB6B30F7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Z-Scores Expanded</text:p>
          </draw:text-box>
        </draw:frame>
        <draw:frame draw:style-name="gr5" draw:text-style-name="P7" draw:layer="layout" svg:width="7.5cm" svg:height="5.625cm" svg:x="0.5cm" svg:y="3.559cm">
          <draw:image xlink:href="Pictures/1000000100000280000001E00093B456B73747BB.png" xlink:type="simple" xlink:show="embed" xlink:actuate="onLoad" draw:mime-type="image/png">
            <text:p/>
          </draw:image>
        </draw:frame>
        <draw:frame draw:style-name="gr5" draw:text-style-name="P7" draw:layer="layout" svg:width="7.5cm" svg:height="5.625cm" svg:x="4.5cm" svg:y="9.184cm">
          <draw:image xlink:href="Pictures/1000000100000280000001E0A9ACFD1D751D83AA.png" xlink:type="simple" xlink:show="embed" xlink:actuate="onLoad" draw:mime-type="image/png">
            <text:p/>
          </draw:image>
        </draw:frame>
        <draw:frame draw:style-name="gr5" draw:text-style-name="P7" draw:layer="layout" svg:width="7.579cm" svg:height="5.684cm" svg:x="14.421cm" svg:y="3.257cm">
          <draw:image xlink:href="Pictures/1000000100000280000001E083278B364C682CA0.png" xlink:type="simple" xlink:show="embed" xlink:actuate="onLoad" draw:mime-type="image/png">
            <text:p/>
          </draw:image>
        </draw:frame>
        <draw:frame draw:style-name="gr5" draw:text-style-name="P7" draw:layer="layout" svg:width="8.079cm" svg:height="6.059cm" svg:x="18cm" svg:y="8.941cm">
          <draw:image xlink:href="Pictures/1000000100000280000001E0B07C24D59AE426C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GLM Prediction</text:p>
          </draw:text-box>
        </draw:frame>
        <draw:frame draw:style-name="gr5" draw:text-style-name="P7" draw:layer="layout" svg:width="15.729cm" svg:height="11.79cm" svg:x="6.271cm" svg:y="3.375cm">
          <draw:image xlink:href="Pictures/100000010000027F000001DFE5DE42D8381E44B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text-style-name="P1" draw:layer="layout" svg:width="25.199cm" svg:height="2.629cm" svg:x="1.4cm" svg:y="0.628cm" presentation:class="title">
          <draw:text-box>
            <text:p>GDSC</text:p>
          </draw:text-box>
        </draw:frame>
        <draw:frame draw:style-name="gr4" draw:text-style-name="P6" draw:layer="layout" svg:width="2.645cm" svg:height="2.645cm" svg:x="24.355cm" svg:y="3cm">
          <draw:image xlink:href="Pictures/100000010000006400000064C066C3864EF1242E.png" xlink:type="simple" xlink:show="embed" xlink:actuate="onLoad" draw:mime-type="image/png">
            <text:p/>
          </draw:image>
        </draw:frame>
        <draw:frame draw:style-name="gr6" draw:text-style-name="P5" draw:layer="layout" svg:width="17cm" svg:height="4.517cm" svg:x="1cm" svg:y="3cm">
          <draw:text-box>
            <text:list text:style-name="L1">
              <text:list-item>
                <text:p>Genomics in Drug Stability and Cancer</text:p>
              </text:list-item>
              <text:list-item>
                <text:p>Database of results treating over 1000 cancer cell lines with over 500 pharmacological substances</text:p>
                <text:list>
                  <text:list-item>
                    <text:p>Includes cytotoxic chemotherapeutics and targeted therapeutics from commercial and academic sources</text:p>
                  </text:list-item>
                </text:list>
              </text:list-item>
              <text:list-item>
                <text:p>Cited by over 3,000 papers since its release in 2013</text:p>
              </text:list-item>
            </text:list>
          </draw:text-box>
        </draw:frame>
        <draw:frame draw:style-name="gr7" draw:text-style-name="P5" draw:layer="layout" svg:width="15cm" svg:height="5.939cm" svg:x="11.5cm" svg:y="7.827cm">
          <draw:text-box>
            <text:list text:style-name="L1">
              <text:list-item>
                <text:p>Measures sensitivity of cell lines to each drug, i.e. effect of drug on cell survivability of each cell line</text:p>
              </text:list-item>
              <text:list-item>
                <text:p>GDSC2 is an updated database with more drugs tested and better controls</text:p>
              </text:list-item>
              <text:list-item>
                <text:p>GDSC<text:span text:style-name="T2">2</text:span> is a subsequent project which repeats these tests while applying 2 different drugs simultaneously to these Cell Lines</text:p>
              </text:list-item>
            </text:list>
          </draw:text-box>
        </draw:frame>
        <draw:frame draw:style-name="gr4" draw:text-style-name="P6" draw:layer="layout" svg:width="7.365cm" svg:height="6.518cm" svg:x="1.5cm" svg:y="7.982cm">
          <draw:image xlink:href="Pictures/10000001000002A600000258B1CF5B36D6CD83AF.png" xlink:type="simple" xlink:show="embed" xlink:actuate="onLoad" draw:mime-type="image/png">
            <text:p/>
          </draw:image>
        </draw:frame>
        <draw:frame draw:style-name="gr8" draw:text-style-name="P9" draw:layer="layout" svg:width="8cm" svg:height="0.489cm" svg:x="1.5cm" svg:y="14.5cm">
          <draw:text-box>
            <text:p><text:span text:style-name="T3">Sensitivity of genes to A-443654, taken from GDSC website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4" draw:text-style-name="P1" draw:layer="layout" svg:width="25.199cm" svg:height="2.629cm" svg:x="1.4cm" svg:y="0.628cm" presentation:class="title">
          <draw:text-box>
            <text:p>Survivability Correlation</text:p>
          </draw:text-box>
        </draw:frame>
        <draw:frame draw:style-name="gr9" draw:text-style-name="P5" draw:layer="layout" svg:width="14cm" svg:height="5.978cm" svg:x="0.5cm" svg:y="3.5cm">
          <draw:text-box>
            <text:list text:style-name="L1">
              <text:list-item>
                <text:p>Work by Laurence Pearl</text:p>
                <text:list>
                  <text:list-item>
                    <text:p><text:span text:style-name="T4">GDSC gives information on drug concentration effect on cell line survivability</text:span></text:p>
                  </text:list-item>
                  <text:list-item>
                    <text:p><text:span text:style-name="T4">L.P. code considers genes mutated in each cell line to calculate ‘survivability correlation’ for each drug against each gene</text:span></text:p>
                  </text:list-item>
                  <text:list-item>
                    <text:p><text:span text:style-name="T4">Higher drug-gene survivability correlation → that gene being wild-type is more important for cell survival when exposed to that drug</text:span></text:p>
                  </text:list-item>
                </text:list>
              </text:list-item>
            </text:list>
          </draw:text-box>
        </draw:frame>
        <draw:frame draw:style-name="gr10" draw:text-style-name="P5" draw:layer="layout" svg:width="15cm" svg:height="5.228cm" svg:x="12.5cm" svg:y="9cm">
          <draw:text-box>
            <text:list text:style-name="L1">
              <text:list-item>
                <text:p>Provides distributions of drug-gene interactions (as well as gene-drug interactions)</text:p>
              </text:list-item>
              <text:list-item>
                <text:p>Most are unimodal/Gaussian distributions, but there are some multimodal</text:p>
              </text:list-item>
              <text:list-item>
                <text:p>Allows for calculation of ‘threshold survivability’ values to determine apparent strong drug-gene targets</text:p>
              </text:list-item>
            </text:list>
          </draw:text-box>
        </draw:frame>
        <draw:frame draw:style-name="gr4" draw:text-style-name="P6" draw:layer="layout" svg:width="5.5cm" svg:height="4.125cm" svg:x="1cm" svg:y="10.875cm">
          <draw:image xlink:href="Pictures/1000000100000280000001E0F807CBD64144C075.png" xlink:type="simple" xlink:show="embed" xlink:actuate="onLoad" draw:mime-type="image/png">
            <text:p/>
          </draw:image>
        </draw:frame>
        <draw:frame draw:style-name="gr4" draw:text-style-name="P6" draw:layer="layout" svg:width="6cm" svg:height="4.5cm" svg:x="6.5cm" svg:y="9.5cm">
          <draw:image xlink:href="Pictures/1000000100000280000001E0F08080E28A8AE022.png" xlink:type="simple" xlink:show="embed" xlink:actuate="onLoad" draw:mime-type="image/png">
            <text:p/>
          </draw:image>
        </draw:frame>
        <draw:frame draw:style-name="gr4" draw:text-style-name="P6" draw:layer="layout" svg:width="6.954cm" svg:height="0.59cm" svg:x="14.5cm" svg:y="3.5cm">
          <draw:image xlink:href="Pictures/1000997F000016A4000001EDB3644AF8144B56D5.svg" xlink:type="simple" xlink:show="embed" xlink:actuate="onLoad" draw:mime-type="image/svg+xml">
            <text:p/>
          </draw:image>
          <draw:image xlink:href="Pictures/10000001000000DB00000013ADFAEEA8C8298FDB.png" xlink:type="simple" xlink:show="embed" xlink:actuate="onLoad" draw:mime-type="image/png"/>
          <svg:title>TexMaths</svg:title>
          <svg:desc>12§display§SC_{D, g} = r(CL_g^{peMax|pIC_{50}}, GDSC_D^{CL})§svg§600§FALSE§</svg:desc>
        </draw:frame>
        <draw:frame draw:style-name="gr4" draw:text-style-name="P6" draw:layer="layout" svg:width="3.763cm" svg:height="0.452cm" svg:x="14.501cm" svg:y="4.579cm">
          <draw:image xlink:href="Pictures/1000366300000C410000017A2C562D645983F5C0.svg" xlink:type="simple" xlink:show="embed" xlink:actuate="onLoad" draw:mime-type="image/svg+xml">
            <text:p/>
          </draw:image>
          <draw:image xlink:href="Pictures/10000001000000770000000E47B41ACD66CCABEA.png" xlink:type="simple" xlink:show="embed" xlink:actuate="onLoad" draw:mime-type="image/png"/>
          <svg:title>TexMaths</svg:title>
          <svg:desc>12§display§\{DT &lt; 0.6: \overline{x} + 3\sigma\}§svg§600§FALSE§</svg:desc>
        </draw:frame>
        <draw:frame draw:name="Shape3" draw:style-name="gr11" draw:text-style-name="P10" draw:layer="layout" svg:width="6.171cm" svg:height="0.436cm" svg:x="19cm" svg:y="4.564cm">
          <draw:image xlink:href="Pictures/10006936000014160000016C0638EE4D8EE82711.svg" xlink:type="simple" xlink:show="embed" xlink:actuate="onLoad" draw:mime-type="image/svg+xml">
            <text:p/>
          </draw:image>
          <draw:image xlink:href="Pictures/10000001000000C20000000E6F980C315491B2F6.png" xlink:type="simple" xlink:show="embed" xlink:actuate="onLoad" draw:mime-type="image/png"/>
          <svg:title>TexMaths</svg:title>
          <svg:desc>12§display§\{DT \geq 0.6: max(\mu_1, \mu_2) + 3\sigma_{1, 2} \}§svg§600§FALSE§</svg:desc>
        </draw:frame>
        <draw:frame draw:name="Shape4" draw:style-name="gr11" draw:text-style-name="P10" draw:layer="layout" svg:width="10.365cm" svg:height="1.275cm" svg:x="14.5cm" svg:y="5.225cm">
          <draw:image xlink:href="Pictures/1000895100001481000002862E8F5DEEA8EA3CC5.svg" xlink:type="simple" xlink:show="embed" xlink:actuate="onLoad" draw:mime-type="image/svg+xml">
            <text:p/>
          </draw:image>
          <draw:image xlink:href="Pictures/10000001000000C600000018D70A52FDB9168B42.png" xlink:type="simple" xlink:show="embed" xlink:actuate="onLoad" draw:mime-type="image/png"/>
          <svg:title>TexMaths</svg:title>
          <svg:desc>12§display§f(x) = A_1e^{-\frac{(x-\mu_1)^2}{2(\sigma_1)^2}} + A_2e^{-\frac{(x-\mu_2)^2}{2(\sigma_2)^2}}§svg§600§FALSE§</svg:desc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draw:style-name="gr4" draw:text-style-name="P6" draw:layer="layout" svg:width="10cm" svg:height="7.5cm" svg:x="1cm" svg:y="0.5cm">
          <draw:image xlink:href="Pictures/1000000100000280000001E0F807CBD64144C075.png" xlink:type="simple" xlink:show="embed" xlink:actuate="onLoad" draw:mime-type="image/png">
            <text:p/>
          </draw:image>
        </draw:frame>
        <draw:frame draw:style-name="gr4" draw:text-style-name="P6" draw:layer="layout" svg:width="10cm" svg:height="7.5cm" svg:x="2.5cm" svg:y="8cm">
          <draw:image xlink:href="Pictures/1000000100000280000001E0F08080E28A8AE022.png" xlink:type="simple" xlink:show="embed" xlink:actuate="onLoad" draw:mime-type="image/png">
            <text:p/>
          </draw:image>
        </draw:frame>
        <draw:frame draw:style-name="gr4" draw:text-style-name="P6" draw:layer="layout" svg:width="14.762cm" svg:height="11.071cm" svg:x="12.738cm" svg:y="1.5cm">
          <draw:image xlink:href="Pictures/1000000100000280000001E09582600848C6742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draw:style-name="gr12" draw:text-style-name="P11" draw:layer="layout" svg:width="14.179cm" svg:height="10.634cm" svg:x="0.5cm" svg:y="0.366cm" presentation:class="graphic" presentation:user-transformed="true">
          <draw:image xlink:href="Pictures/1000000100000280000001E03215279456C52929.png" xlink:type="simple" xlink:show="embed" xlink:actuate="onLoad" draw:mime-type="image/png">
            <text:p/>
          </draw:image>
        </draw:frame>
        <draw:frame draw:style-name="gr4" draw:text-style-name="P6" draw:layer="layout" svg:width="12.667cm" svg:height="9.5cm" svg:x="14.313cm" svg:y="5.5cm">
          <draw:image xlink:href="Pictures/1000000100000280000001E0394FBE15601AE57F.png" xlink:type="simple" xlink:show="embed" xlink:actuate="onLoad" draw:mime-type="image/png">
            <text:p/>
          </draw:image>
        </draw:frame>
        <draw:frame draw:style-name="gr4" draw:text-style-name="P6" draw:layer="layout" svg:width="12cm" svg:height="1.205cm" svg:x="15cm" svg:y="3.5cm">
          <draw:image xlink:href="Pictures/1000D15500001F12000003203A39568891AFB569.svg" xlink:type="simple" xlink:show="embed" xlink:actuate="onLoad" draw:mime-type="image/svg+xml">
            <text:p/>
          </draw:image>
          <draw:image xlink:href="Pictures/100000010000012D0000001E6204EA52E448FAC9.png" xlink:type="simple" xlink:show="embed" xlink:actuate="onLoad" draw:mime-type="image/png"/>
          <svg:title>TexMaths</svg:title>
          <svg:desc>28§display§Bliss_{eMax} = \frac{eMax^1 + eMax^2 - (eMax^1 * eMax^2)}{eMax^{1, 2}}§svg§600§TRUE§</svg:desc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4" draw:text-style-name="P1" draw:layer="layout" svg:width="25.199cm" svg:height="2.629cm" svg:x="1.4cm" svg:y="0.628cm" presentation:class="title">
          <draw:text-box>
            <text:p>Target Investigation</text:p>
          </draw:text-box>
        </draw:frame>
        <draw:frame draw:style-name="gr4" draw:text-style-name="P6" draw:layer="layout" svg:width="7cm" svg:height="5.247cm" svg:x="18.5cm" svg:y="3.253cm">
          <draw:image xlink:href="Pictures/100000010000027F000001DFF9C2E650C0D83448.png" xlink:type="simple" xlink:show="embed" xlink:actuate="onLoad" draw:mime-type="image/png">
            <text:p/>
          </draw:image>
        </draw:frame>
        <draw:frame draw:style-name="gr13" draw:text-style-name="P5" draw:layer="layout" svg:width="15cm" svg:height="7.109cm" svg:x="0.5cm" svg:y="3cm">
          <draw:text-box>
            <text:list text:style-name="L1">
              <text:list-item>
                <text:p>Comparing predicted ‘strong’ targets/interactions from our GDSC-based ‘survivability correlation’ with official targets provided by internal and external databased</text:p>
              </text:list-item>
              <text:list-item>
                <text:p>GDSC provides known gene targets for some drugs, PubChem identifiers for some, and some are contained within DrugBank</text:p>
                <text:list>
                  <text:list-item>
                    <text:p><text:span text:style-name="T4">26 substances with no targets nor external identifiers given which appear to be internal residues tested by GDSC</text:span></text:p>
                  </text:list-item>
                </text:list>
              </text:list-item>
            </text:list>
          </draw:text-box>
        </draw:frame>
        <draw:frame draw:style-name="gr14" draw:text-style-name="P12" draw:layer="layout" svg:width="14.5cm" svg:height="4.689cm" svg:x="13cm" svg:y="10.311cm">
          <draw:text-box>
            <text:list text:style-name="L1">
              <text:list-header>
                <text:p><text:span text:style-name="T5">Next Steps:</text:span></text:p>
              </text:list-header>
              <text:list-item>
                <text:p><text:span text:style-name="T5">Compare GDSC and GDSC</text:span><text:span text:style-name="T6">2</text:span><text:span text:style-name="T5"> IC</text:span><text:span text:style-name="T7">50</text:span><text:span text:style-name="T5"> single-drug results</text:span></text:p>
              </text:list-item>
              <text:list-item>
                <text:p><text:span text:style-name="T5">Investigate known gene targets in comparison to survivability-correlation-predicted strong targets</text:span></text:p>
              </text:list-item>
              <text:list-item>
                <text:p><text:span text:style-name="T5">Investigation of PPI/gene interaction pathways for targets not predicted by GDSC and other outliers</text:span></text:p>
              </text:list-item>
            </text:list>
          </draw:text-box>
        </draw:frame>
        <draw:frame draw:style-name="gr4" draw:text-style-name="P6" draw:layer="layout" svg:width="10.877cm" svg:height="4.624cm" svg:x="2cm" svg:y="10.5cm">
          <draw:image xlink:href="Pictures/10000001000003D00000019F05BDBB107E78184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6-02-13T10:53:55.316739674</meta:creation-date>
    <dc:date>2026-07-22T15:14:58.450392973</dc:date>
    <meta:editing-duration>P1DT6H8M13S</meta:editing-duration>
    <meta:editing-cycles>34</meta:editing-cycles>
    <meta:generator>LibreOffice/7.3.7.2$Linux_X86_64 LibreOffice_project/30$Build-2</meta:generator>
    <meta:document-statistic meta:object-count="89"/>
  </office:meta>
</office:document-meta>
</file>